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name-asian="Segoe UI" style:font-weight-asian="bold" style:font-name-complex="Tahoma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0.416cm" svg:height="7.569cm" svg:x="5.431cm" svg:y="5.849cm">
            <draw:object draw:notify-on-update-of-ranges="Sheet1.E4:Sheet1.E9 Sheet1.F4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Stefans Law</text:p>
          </table:table-cell>
          <table:covered-table-cell table:style-name="Default"/>
          <table:covered-table-cell table:number-columns-repeated="4"/>
          <table:table-cell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6" office:value-type="string" calcext:value-type="string">
            <text:p>Voltage</text:p>
            <text:p> V (V)</text:p>
          </table:table-cell>
          <table:table-cell table:style-name="ce6" office:value-type="string" calcext:value-type="string">
            <text:p>Current </text:p>
            <text:p>I (A)</text:p>
          </table:table-cell>
          <table:table-cell table:style-name="ce9" office:value-type="string" calcext:value-type="string">
            <text:p>Resistor </text:p>
            <text:p>R=V/I </text:p>
            <text:p>(  Ω  )</text:p>
          </table:table-cell>
          <table:table-cell table:style-name="ce6" office:value-type="string" calcext:value-type="string">
            <text:p>Power</text:p>
            <text:p>P= V x I</text:p>
            <text:p>(W)</text:p>
          </table:table-cell>
          <table:table-cell table:style-name="ce6" office:value-type="string" calcext:value-type="string">
            <text:p>log<text:span text:style-name="T2">10</text:span><text:span text:style-name="T3">(R)</text:span></text:p>
          </table:table-cell>
          <table:table-cell table:style-name="ce6" office:value-type="string" calcext:value-type="string">
            <text:p>log<text:span text:style-name="T2">10</text:span><text:span text:style-name="T3">(P)</text:span></text:p>
          </table:table-cell>
          <table:table-cell/>
        </table:table-row>
        <table:table-row table:style-name="ro2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table:formula="of:=[.A4]/[.B4]" office:value-type="float" office:value="9.45945945945946" calcext:value-type="float">
            <text:p>9.45945945945946</text:p>
          </table:table-cell>
          <table:table-cell table:style-name="ce3" table:formula="of:=[.A4]*[.B4]" office:value-type="float" office:value="1.295" calcext:value-type="float">
            <text:p>1.295</text:p>
          </table:table-cell>
          <table:table-cell table:style-name="ce3" table:formula="of:=LOG10([.C4])" office:value-type="float" office:value="0.975866320283281" calcext:value-type="float">
            <text:p>0.975866320283281</text:p>
          </table:table-cell>
          <table:table-cell table:style-name="ce3" table:formula="of:=LOG10([.D4])" office:value-type="float" office:value="0.112269768417271" calcext:value-type="float">
            <text:p>0.112269768417271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0.4" calcext:value-type="float">
            <text:p>0.4</text:p>
          </table:table-cell>
          <table:table-cell table:style-name="ce3" table:formula="of:=[.A5]/[.B5]" office:value-type="float" office:value="10" calcext:value-type="float">
            <text:p>10</text:p>
          </table:table-cell>
          <table:table-cell table:style-name="ce3" table:formula="of:=[.A5]*[.B5]" office:value-type="float" office:value="1.6" calcext:value-type="float">
            <text:p>1.6</text:p>
          </table:table-cell>
          <table:table-cell table:style-name="ce3" table:formula="of:=LOG10([.C5])" office:value-type="float" office:value="1" calcext:value-type="float">
            <text:p>1</text:p>
          </table:table-cell>
          <table:table-cell table:style-name="ce3" table:formula="of:=LOG10([.D5])" office:value-type="float" office:value="0.204119982655925" calcext:value-type="float">
            <text:p>0.204119982655925</text:p>
          </table:table-cell>
          <table:table-cell/>
        </table:table-row>
        <table:table-row table:style-name="ro2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table:formula="of:=[.A6]/[.B6]" office:value-type="float" office:value="10.7142857142857" calcext:value-type="float">
            <text:p>10.7142857142857</text:p>
          </table:table-cell>
          <table:table-cell table:style-name="ce3" table:formula="of:=[.A6]*[.B6]" office:value-type="float" office:value="1.89" calcext:value-type="float">
            <text:p>1.89</text:p>
          </table:table-cell>
          <table:table-cell table:style-name="ce3" table:formula="of:=LOG10([.C6])" office:value-type="float" office:value="1.02996322337744" calcext:value-type="float">
            <text:p>1.02996322337744</text:p>
          </table:table-cell>
          <table:table-cell table:style-name="ce3" table:formula="of:=LOG10([.D6])" office:value-type="float" office:value="0.276461804173244" calcext:value-type="float">
            <text:p>0.276461804173244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table:formula="of:=[.A7]/[.B7]" office:value-type="float" office:value="11.1111111111111" calcext:value-type="float">
            <text:p>11.1111111111111</text:p>
          </table:table-cell>
          <table:table-cell table:style-name="ce3" table:formula="of:=[.A7]*[.B7]" office:value-type="float" office:value="2.25" calcext:value-type="float">
            <text:p>2.25</text:p>
          </table:table-cell>
          <table:table-cell table:style-name="ce3" table:formula="of:=LOG10([.C7])" office:value-type="float" office:value="1.04575749056068" calcext:value-type="float">
            <text:p>1.04575749056068</text:p>
          </table:table-cell>
          <table:table-cell table:style-name="ce3" table:formula="of:=LOG10([.D7])" office:value-type="float" office:value="0.352182518111363" calcext:value-type="float">
            <text:p>0.352182518111363</text:p>
          </table:table-cell>
          <table:table-cell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formula="of:=[.A8]/[.B8]" office:value-type="float" office:value="11.7021276595745" calcext:value-type="float">
            <text:p>11.7021276595745</text:p>
          </table:table-cell>
          <table:table-cell table:style-name="ce3" table:formula="of:=[.A8]*[.B8]" office:value-type="float" office:value="2.585" calcext:value-type="float">
            <text:p>2.585</text:p>
          </table:table-cell>
          <table:table-cell table:style-name="ce3" table:formula="of:=LOG10([.C8])" office:value-type="float" office:value="1.06826483155853" calcext:value-type="float">
            <text:p>1.06826483155853</text:p>
          </table:table-cell>
          <table:table-cell table:style-name="ce3" table:formula="of:=LOG10([.D8])" office:value-type="float" office:value="0.412460547429961" calcext:value-type="float">
            <text:p>0.412460547429961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A9]/[.B9]" office:value-type="float" office:value="12" calcext:value-type="float">
            <text:p>12</text:p>
          </table:table-cell>
          <table:table-cell table:style-name="ce3" table:formula="of:=[.A9]*[.B9]" office:value-type="float" office:value="3" calcext:value-type="float">
            <text:p>3</text:p>
          </table:table-cell>
          <table:table-cell table:style-name="ce3" table:formula="of:=LOG10([.C9])" office:value-type="float" office:value="1.07918124604762" calcext:value-type="float">
            <text:p>1.07918124604762</text:p>
          </table:table-cell>
          <table:table-cell table:style-name="ce3" table:formula="of:=LOG10([.D9])" office:value-type="float" office:value="0.477121254719662" calcext:value-type="float">
            <text:p>0.477121254719662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office:value-type="string" calcext:value-type="string">
            <text:p><text:span text:style-name="T1">Regression</text:span>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egression Model</text:p>
          </table:table-cell>
          <table:table-cell table:style-name="Default" office:value-type="string" calcext:value-type="string">
            <text:p>Linear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table:number-matrix-columns-spanned="2" table:number-matrix-rows-spanned="5" table:formula="of:=LINEST([.$F$4:.$F$9] ; [.$E$4:.$E$9] ; 1 ; 1)" office:value-type="float" office:value="3.3875868236959" calcext:value-type="float">
            <text:p>3.3875868236959</text:p>
          </table:table-cell>
          <table:table-cell office:value-type="float" office:value="-3.19419116896237" calcext:value-type="float">
            <text:p>-3.19419116896237</text:p>
          </table:table-cell>
          <table:table-cell table:number-columns-repeated="5"/>
        </table:table-row>
        <table:table-row table:style-name="ro2">
          <table:table-cell office:value-type="float" office:value="0.164780349673679" calcext:value-type="float">
            <text:p>0.164780349673679</text:p>
          </table:table-cell>
          <table:table-cell office:value-type="float" office:value="0.170351457222064" calcext:value-type="float">
            <text:p>0.170351457222064</text:p>
          </table:table-cell>
          <table:table-cell table:number-columns-repeated="5"/>
        </table:table-row>
        <table:table-row table:style-name="ro2">
          <table:table-cell office:value-type="float" office:value="0.99062440187932" calcext:value-type="float">
            <text:p>0.99062440187932</text:p>
          </table:table-cell>
          <table:table-cell office:value-type="float" office:value="0.0146472685392175" calcext:value-type="float">
            <text:p>0.0146472685392175</text:p>
          </table:table-cell>
          <table:table-cell table:number-columns-repeated="5"/>
        </table:table-row>
        <table:table-row table:style-name="ro2">
          <table:table-cell office:value-type="float" office:value="422.639447266509" calcext:value-type="float">
            <text:p>422.63944726650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0.0906741133281101" calcext:value-type="float">
            <text:p>0.0906741133281101</text:p>
          </table:table-cell>
          <table:table-cell office:value-type="float" office:value="0.000858169902639803" calcext:value-type="float">
            <text:p>0.000858169902639803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table:formula="of:=[.$A$17]" office:value-type="float" office:value="0.99062440187932" calcext:value-type="float">
            <text:p>0.990624401879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table:formula="of:=[.$B$17]" office:value-type="float" office:value="0.0146472685392175" calcext:value-type="float">
            <text:p>0.0146472685392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table:formula="of:=1 - (1 - [.$A$17])*([.$B$25] - 1)/([.$B$25] - [.$B$24] - 1)" office:value-type="float" office:value="0.98828050234915" calcext:value-type="float">
            <text:p>0.9882805023491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office:value-type="string" calcext:value-type="string">
            <text:p>Analysis of Variance (ANOVA)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table:style-name="ce4" office:value-type="string" calcext:value-type="string">
            <text:p>S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table:formula="of:=[.$B$24]" office:value-type="float" office:value="1" calcext:value-type="float">
            <text:p>1</text:p>
          </table:table-cell>
          <table:table-cell table:style-name="ce4" table:formula="of:=[.$A$19]" office:value-type="float" office:value="0.0906741133281101" calcext:value-type="float">
            <text:p>0.0906741133281101</text:p>
          </table:table-cell>
          <table:table-cell table:style-name="ce4" table:formula="of:=[.$A$19] / [.$B$30]" office:value-type="float" office:value="0.0906741133281101" calcext:value-type="float">
            <text:p>0.0906741133281101</text:p>
          </table:table-cell>
          <table:table-cell table:style-name="ce4" table:formula="of:=[.$A$18]" office:value-type="float" office:value="422.639447266509" calcext:value-type="float">
            <text:p>422.639447266509</text:p>
          </table:table-cell>
          <table:table-cell table:style-name="ce4" table:formula="of:=LEGACY.FDIST([.$A$18] ; [.$B$30] ; [.$B$18])" office:value-type="float" office:value="0.0000330667532911559" calcext:value-type="float">
            <text:p>3.30667532911559E-05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table:formula="of:=[.$B$18]" office:value-type="float" office:value="4" calcext:value-type="float">
            <text:p>4</text:p>
          </table:table-cell>
          <table:table-cell table:style-name="ce4" table:formula="of:=[.$B$19]" office:value-type="float" office:value="0.000858169902639803" calcext:value-type="float">
            <text:p>0.000858169902639803</text:p>
          </table:table-cell>
          <table:table-cell table:style-name="ce4" table:formula="of:=[.$B$19] / [.$B$18]" office:value-type="float" office:value="0.000214542475659951" calcext:value-type="float">
            <text:p>0.000214542475659951</text:p>
          </table:table-cell>
          <table:table-cell table:style-name="ce4" table:number-columns-repeated="2"/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table:formula="of:=[.$B$30] + [.$B$18]" office:value-type="float" office:value="5" calcext:value-type="float">
            <text:p>5</text:p>
          </table:table-cell>
          <table:table-cell table:style-name="ce4" table:formula="of:=[.$A$19] + [.$B$19]" office:value-type="float" office:value="0.0915322832307499" calcext:value-type="float">
            <text:p>0.0915322832307499</text:p>
          </table:table-cell>
          <table:table-cell table:style-name="ce4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office:value-type="string" calcext:value-type="string">
            <text:p>Confidence level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table:style-name="ce4" office:value-type="string" calcext:value-type="string">
            <text:p>Standard Error</text:p>
          </table:table-cell>
          <table:table-cell table:style-name="ce4" office:value-type="string" calcext:value-type="string">
            <text:p>t-Statistic</text:p>
          </table:table-cell>
          <table:table-cell table:style-name="ce4" office:value-type="string" calcext:value-type="string">
            <text:p>P-value</text:p>
          </table:table-cell>
          <table:table-cell table:style-name="ce4" table:formula="of:=COM.MICROSOFT.CONCAT(&quot;Lower &quot; ; INT([.$B$34] * 100) ; &quot;%&quot;)" office:value-type="string" office:string-value="Lower 95%" calcext:value-type="string">
            <text:p>Lower 95%</text:p>
          </table:table-cell>
          <table:table-cell table:style-name="ce4" table:formula="of:=COM.MICROSOFT.CONCAT(&quot;Upper &quot; ; INT([.$B$34] * 100) ; &quot;%&quot;)" office:value-type="string" office:string-value="Upper 95%" calcext:value-type="string">
            <text:p>Upper 95%</text:p>
          </table:table-cell>
        </table:table-row>
        <table:table-row table:style-name="ro2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$15:.$B$15]; 1 ; ROW([.$B$38])+1 - ROW())" office:value-type="float" office:value="-3.19419116896237" calcext:value-type="float">
            <text:p>-3.19419116896237</text:p>
          </table:table-cell>
          <table:table-cell table:style-name="ce4" table:number-matrix-columns-spanned="1" table:number-matrix-rows-spanned="2" table:formula="of:=INDEX([.$A$16:.$B$16]; 1 ; ROW([.$C$38])+1 - ROW())" office:value-type="float" office:value="0.170351457222064" calcext:value-type="float">
            <text:p>0.170351457222064</text:p>
          </table:table-cell>
          <table:table-cell table:style-name="ce4" table:number-matrix-columns-spanned="1" table:number-matrix-rows-spanned="2" table:formula="of:=[.$B$37:.$B$38] / [.$C$37:.$C$38]" office:value-type="float" office:value="-18.7505949232858" calcext:value-type="float">
            <text:p>-18.7505949232858</text:p>
          </table:table-cell>
          <table:table-cell table:style-name="ce4" table:number-matrix-columns-spanned="1" table:number-matrix-rows-spanned="2" table:formula="of:=LEGACY.TDIST(ABS([.$D$37:.$D$38]) ; [.$B$18] ; 2 )" office:value-type="float" office:value="0.0000476321974807738" calcext:value-type="float">
            <text:p>4.76321974807738E-05</text:p>
          </table:table-cell>
          <table:table-cell table:style-name="ce4" table:number-matrix-columns-spanned="1" table:number-matrix-rows-spanned="2" table:formula="of:=[.$B$37:.$B$38] - [.$C$37:.$C$38] * TINV(1 - [.$B$34] ; [.$B$18])" office:value-type="float" office:value="-3.66716263852988" calcext:value-type="float">
            <text:p>-3.66716263852988</text:p>
          </table:table-cell>
          <table:table-cell table:style-name="ce4" table:number-matrix-columns-spanned="1" table:number-matrix-rows-spanned="2" table:formula="of:=[.$B$37:.$B$38] + [.$C$37:.$C$38] * TINV(1 - [.$B$34] ; [.$B$18])" office:value-type="float" office:value="-2.72121969939486" calcext:value-type="float">
            <text:p>-2.72121969939486</text:p>
          </table:table-cell>
        </table:table-row>
        <table:table-row table:style-name="ro2">
          <table:table-cell table:formula="of:=&quot;X1&quot;" office:value-type="string" office:string-value="X1" calcext:value-type="string">
            <text:p>X1</text:p>
          </table:table-cell>
          <table:table-cell office:value-type="float" office:value="3.3875868236959" calcext:value-type="float">
            <text:p>3.3875868236959</text:p>
          </table:table-cell>
          <table:table-cell table:style-name="ce4" office:value-type="float" office:value="0.164780349673679" calcext:value-type="float">
            <text:p>0.164780349673679</text:p>
          </table:table-cell>
          <table:table-cell table:style-name="ce4" office:value-type="float" office:value="20.5581965956771" calcext:value-type="float">
            <text:p>20.5581965956771</text:p>
          </table:table-cell>
          <table:table-cell table:style-name="ce4" office:value-type="float" office:value="0.0000330667532911559" calcext:value-type="float">
            <text:p>3.30667532911559E-05</text:p>
          </table:table-cell>
          <table:table-cell table:style-name="ce4" office:value-type="float" office:value="2.93008322841164" calcext:value-type="float">
            <text:p>2.93008322841164</text:p>
          </table:table-cell>
          <table:table-cell table:style-name="ce4" office:value-type="float" office:value="3.84509041898017" calcext:value-type="float">
            <text:p>3.84509041898017</text:p>
          </table:table-cell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style-name="ce4" table:formula="of:=&quot;Y&quot;" office:value-type="string" office:string-value="Y" calcext:value-type="string">
            <text:p>Y</text:p>
          </table:table-cell>
          <table:table-cell table:style-name="ce4" office:value-type="string" calcext:value-type="string">
            <text:p>Residual</text:p>
          </table:table-cell>
          <table:table-cell table:number-columns-repeated="3"/>
        </table:table-row>
        <table:table-row table:style-name="ro2">
          <table:table-cell table:number-matrix-columns-spanned="1" table:number-matrix-rows-spanned="6" table:formula="of:=[.$E$4:.$E$9]" office:value-type="float" office:value="0.975866320283281" calcext:value-type="float">
            <text:p>0.975866320283281</text:p>
          </table:table-cell>
          <table:table-cell table:number-matrix-columns-spanned="1" table:number-matrix-rows-spanned="6" table:formula="of:=MMULT([.$A$41:.$A$46] ; [.$B$38]) + [.$B$37]" office:value-type="float" office:value="0.111640719317882" calcext:value-type="float">
            <text:p>0.111640719317882</text:p>
          </table:table-cell>
          <table:table-cell table:style-name="ce4" table:number-matrix-columns-spanned="1" table:number-matrix-rows-spanned="6" table:formula="of:=[.$F$4:.$F$9]" office:value-type="float" office:value="0.112269768417271" calcext:value-type="float">
            <text:p>0.112269768417271</text:p>
          </table:table-cell>
          <table:table-cell table:style-name="ce4" table:number-matrix-columns-spanned="1" table:number-matrix-rows-spanned="6" table:formula="of:=[.$C$41:.$C$46] - [.$B$41:.$B$46]" office:value-type="float" office:value="0.000629049099388504" calcext:value-type="float">
            <text:p>0.00062904909938850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93395654733537" calcext:value-type="float">
            <text:p>0.193395654733537</text:p>
          </table:table-cell>
          <table:table-cell table:style-name="ce4" office:value-type="float" office:value="0.204119982655925" calcext:value-type="float">
            <text:p>0.204119982655925</text:p>
          </table:table-cell>
          <table:table-cell table:style-name="ce4" office:value-type="float" office:value="0.0107243279223874" calcext:value-type="float">
            <text:p>0.0107243279223874</text:p>
          </table:table-cell>
          <table:table-cell table:number-columns-repeated="3"/>
        </table:table-row>
        <table:table-row table:style-name="ro2">
          <table:table-cell office:value-type="float" office:value="1.02996322337744" calcext:value-type="float">
            <text:p>1.02996322337744</text:p>
          </table:table-cell>
          <table:table-cell office:value-type="float" office:value="0.294898675442421" calcext:value-type="float">
            <text:p>0.294898675442421</text:p>
          </table:table-cell>
          <table:table-cell table:style-name="ce4" office:value-type="float" office:value="0.276461804173244" calcext:value-type="float">
            <text:p>0.276461804173244</text:p>
          </table:table-cell>
          <table:table-cell table:style-name="ce4" office:value-type="float" office:value="-0.0184368712691769" calcext:value-type="float">
            <text:p>-0.0184368712691769</text:p>
          </table:table-cell>
          <table:table-cell table:number-columns-repeated="3"/>
        </table:table-row>
        <table:table-row table:style-name="ro2">
          <table:table-cell office:value-type="float" office:value="1.04575749056068" calcext:value-type="float">
            <text:p>1.04575749056068</text:p>
          </table:table-cell>
          <table:table-cell office:value-type="float" office:value="0.34840312684227" calcext:value-type="float">
            <text:p>0.34840312684227</text:p>
          </table:table-cell>
          <table:table-cell table:style-name="ce4" office:value-type="float" office:value="0.352182518111363" calcext:value-type="float">
            <text:p>0.352182518111363</text:p>
          </table:table-cell>
          <table:table-cell table:style-name="ce4" office:value-type="float" office:value="0.00377939126909266" calcext:value-type="float">
            <text:p>0.00377939126909266</text:p>
          </table:table-cell>
          <table:table-cell table:number-columns-repeated="3"/>
        </table:table-row>
        <table:table-row table:style-name="ro2">
          <table:table-cell office:value-type="float" office:value="1.06826483155853" calcext:value-type="float">
            <text:p>1.06826483155853</text:p>
          </table:table-cell>
          <table:table-cell office:value-type="float" office:value="0.424648698643022" calcext:value-type="float">
            <text:p>0.424648698643022</text:p>
          </table:table-cell>
          <table:table-cell table:style-name="ce4" office:value-type="float" office:value="0.412460547429961" calcext:value-type="float">
            <text:p>0.412460547429961</text:p>
          </table:table-cell>
          <table:table-cell table:style-name="ce4" office:value-type="float" office:value="-0.0121881512130603" calcext:value-type="float">
            <text:p>-0.0121881512130603</text:p>
          </table:table-cell>
          <table:table-cell table:number-columns-repeated="3"/>
        </table:table-row>
        <table:table-row table:style-name="ro2">
          <table:table-cell office:value-type="float" office:value="1.07918124604762" calcext:value-type="float">
            <text:p>1.07918124604762</text:p>
          </table:table-cell>
          <table:table-cell office:value-type="float" office:value="0.461629000528295" calcext:value-type="float">
            <text:p>0.461629000528295</text:p>
          </table:table-cell>
          <table:table-cell table:style-name="ce4" office:value-type="float" office:value="0.477121254719662" calcext:value-type="float">
            <text:p>0.477121254719662</text:p>
          </table:table-cell>
          <table:table-cell table:style-name="ce4" office:value-type="float" office:value="0.0154922541913674" calcext:value-type="float">
            <text:p>0.01549225419136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21:25:17.09516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5T15:47:14.844724400</meta:creation-date>
    <dc:date>2026-05-06T21:37:19.851414600</dc:date>
    <meta:editing-duration>PT16M2S</meta:editing-duration>
    <meta:editing-cycles>6</meta:editing-cycles>
    <meta:generator>LibreOffice/26.2.2.2$Windows_X86_64 LibreOffice_project/1f77d10d6938fd34972958f64b2bcfa54f8b1ba5</meta:generator>
    <meta:print-date>2026-04-05T16:41:55.523346500</meta:print-date>
    <meta:printed-by>PDF files</meta:printed-by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3pt" style:font-size-asian="13pt" style:font-size-complex="13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19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underline-style="solid" style:text-underline-type="double" style:text-underline-width="auto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0.417cm" svg:height="7.57cm" xlink:href=".." xlink:type="simple" chart:class="chart:scatter" chart:style-name="ch1">
        <chart:title svg:x="3.799cm" svg:y="0.287cm" chart:style-name="ch2">
          <text:p><text:span text:style-name="T1">Stefan's Law</text:span></text:p>
        </chart:title>
        <chart:subtitle svg:x="3.92cm" svg:y="1.093cm" chart:style-name="ch3">
          <text:p><text:span text:style-name="T2">Vighnajit CHM</text:span></text:p>
        </chart:subtitle>
        <chart:plot-area chart:style-name="ch4" svg:x="0.94cm" svg:y="2.547cm" svg:width="8.893cm" svg:height="4.391cm">
          <chart:coordinate-region svg:x="1.692cm" svg:y="2.75cm" svg:width="7.89cm" svg:height="3.535cm"/>
          <chart:axis chart:dimension="x" chart:name="primary-x" chart:style-name="ch5">
            <chart:title svg:x="4.632cm" svg:y="7.02cm" chart:style-name="ch2">
              <text:p><text:span text:style-name="T3">log_10(R)</text:span></text:p>
            </chart:title>
            <chart:grid chart:style-name="ch6" chart:class="major"/>
          </chart:axis>
          <chart:axis chart:dimension="y" chart:name="primary-y" chart:style-name="ch7">
            <chart:title svg:x="0.293cm" svg:y="4.737cm" chart:style-name="ch8">
              <text:p><text:span text:style-name="T3">log_10(P)</text:span></text:p>
            </chart:title>
            <chart:grid chart:style-name="ch6" chart:class="major"/>
          </chart:axis>
          <chart:series chart:style-name="ch9" chart:values-cell-range-address="Sheet1.F4:Sheet1.F9" chart:class="chart:scatter">
            <chart:domain table:cell-range-address="Sheet1.E4:Sheet1.E9"/>
            <chart:regression-curve chart:style-name="ch10">
              <chart:equation chart:display-equation="true" chart:display-r-square="false" svg:x="1.281cm" svg:y="1.75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5866320283281">
                <text:p>0.975866320283281</text:p>
                <draw:g>
                  <svg:desc>Sheet1.E4:Sheet1.E9</svg:desc>
                </draw:g>
              </table:table-cell>
              <table:table-cell office:value-type="float" office:value="0.112269768417271">
                <text:p>0.112269768417271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996322337744">
                <text:p>1.02996322337744</text:p>
              </table:table-cell>
              <table:table-cell office:value-type="float" office:value="0.276461804173244">
                <text:p>0.276461804173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575749056068">
                <text:p>1.04575749056068</text:p>
              </table:table-cell>
              <table:table-cell office:value-type="float" office:value="0.352182518111363">
                <text:p>0.352182518111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826483155853">
                <text:p>1.06826483155853</text:p>
              </table:table-cell>
              <table:table-cell office:value-type="float" office:value="0.412460547429961">
                <text:p>0.412460547429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0.477121254719662">
                <text:p>0.477121254719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